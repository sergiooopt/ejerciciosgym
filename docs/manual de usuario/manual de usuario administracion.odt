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ec6d3" officeooo:paragraph-rsid="000ec6d3"/>
    </style:style>
    <style:style style:name="P2" style:family="paragraph" style:parent-style-name="Text_20_body">
      <style:paragraph-properties fo:break-before="pag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Heading_20_1">
      <style:paragraph-properties fo:margin-top="0cm" fo:margin-bottom="0.247cm" style:contextual-spacing="false" fo:line-height="115%"/>
    </style:style>
    <style:style style:name="P6" style:family="paragraph" style:parent-style-name="Heading_20_2">
      <style:paragraph-properties fo:margin-top="0cm" fo:margin-bottom="0.247cm" style:contextual-spacing="false" fo:line-height="115%"/>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fo:break-before="page"/>
    </style:style>
    <style:style style:name="P14" style:family="paragraph" style:parent-style-name="Heading_20_1">
      <style:paragraph-properties fo:text-align="justify" style:justify-single-word="false"/>
    </style:style>
    <style:style style:name="P15" style:family="paragraph" style:parent-style-name="Heading_20_2">
      <style:paragraph-properties fo:margin-top="0cm" fo:margin-bottom="0.247cm" style:contextual-spacing="false" fo:line-height="115%" fo:text-align="justify" style:justify-single-word="false"/>
    </style:style>
    <style:style style:name="P16" style:family="paragraph" style:parent-style-name="Text_20_body">
      <style:paragraph-properties fo:margin-top="0cm" fo:margin-bottom="0cm" style:contextual-spacing="false" fo:text-align="justify" style:justify-single-word="false"/>
    </style:style>
    <style:style style:name="P17" style:family="paragraph" style:parent-style-name="Text_20_body" style:list-style-name="L5">
      <style:paragraph-properties fo:margin-top="0cm" fo:margin-bottom="0cm" style:contextual-spacing="false"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margin-top="0cm" fo:margin-bottom="0cm" style:contextual-spacing="false"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margin-top="0cm" fo:margin-bottom="0cm" style:contextual-spacing="false"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Heading_20_3">
      <style:paragraph-properties fo:margin-top="0cm" fo:margin-bottom="0.247cm" style:contextual-spacing="false" fo:line-height="115%" fo:text-align="justify" style:justify-single-word="false"/>
    </style:style>
    <style:style style:name="P24" style:family="paragraph" style:parent-style-name="Text_20_body" style:list-style-name="L8">
      <style:paragraph-properties fo:margin-top="0cm" fo:margin-bottom="0cm" style:contextual-spacing="false" fo:text-align="justify" style:justify-single-word="false"/>
    </style:style>
    <style:style style:name="P25" style:family="paragraph" style:parent-style-name="Text_20_body" style:list-style-name="L8">
      <style:paragraph-properties fo:text-align="justify" style:justify-single-word="false"/>
    </style:style>
    <style:style style:name="P26" style:family="paragraph" style:parent-style-name="Text_20_body">
      <style:paragraph-properties fo:text-align="justify" style:justify-single-word="false"/>
      <style:text-properties officeooo:paragraph-rsid="00173006"/>
    </style:style>
    <style:style style:name="P27" style:family="paragraph" style:parent-style-name="Heading_20_2">
      <style:paragraph-properties fo:text-align="justify" style:justify-single-word="false"/>
    </style:style>
    <style:style style:name="P28" style:family="paragraph" style:parent-style-name="Text_20_body" style:list-style-name="L9">
      <style:paragraph-properties fo:margin-top="0cm" fo:margin-bottom="0cm" style:contextual-spacing="false"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margin-top="0cm" fo:margin-bottom="0cm" style:contextual-spacing="false"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margin-top="0cm" fo:margin-bottom="0cm" style:contextual-spacing="false" fo:text-align="justify" style:justify-single-word="false"/>
    </style:style>
    <style:style style:name="P33" style:family="paragraph" style:parent-style-name="Text_20_body" style:list-style-name="L11">
      <style:paragraph-properties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2">
      <style:paragraph-properties fo:text-align="justify" style:justify-single-word="false"/>
    </style:style>
    <style:style style:name="P36" style:family="paragraph" style:parent-style-name="Text_20_body" style:list-style-name="L13">
      <style:paragraph-properties fo:margin-top="0cm" fo:margin-bottom="0cm" style:contextual-spacing="false" fo:text-align="justify" style:justify-single-word="false"/>
    </style:style>
    <style:style style:name="P37" style:family="paragraph" style:parent-style-name="Text_20_body" style:list-style-name="L13">
      <style:paragraph-properties fo:text-align="justify" style:justify-single-word="false"/>
    </style:style>
    <style:style style:name="P38" style:family="paragraph" style:parent-style-name="Text_20_body" style:list-style-name="L14">
      <style:paragraph-properties fo:margin-top="0cm" fo:margin-bottom="0cm" style:contextual-spacing="false" fo:text-align="justify" style:justify-single-word="false"/>
    </style:style>
    <style:style style:name="P39" style:family="paragraph" style:parent-style-name="Text_20_body" style:list-style-name="L14">
      <style:paragraph-properties fo:text-align="justify" style:justify-single-word="false"/>
    </style:style>
    <style:style style:name="P40" style:family="paragraph" style:parent-style-name="Text_20_body" style:list-style-name="L15">
      <style:paragraph-properties fo:margin-top="0cm" fo:margin-bottom="0cm" style:contextual-spacing="false" fo:text-align="justify" style:justify-single-word="false"/>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margin-top="0cm" fo:margin-bottom="0cm" style:contextual-spacing="false" fo:text-align="justify" style:justify-single-word="false"/>
    </style:style>
    <style:style style:name="P43" style:family="paragraph" style:parent-style-name="Text_20_body" style:list-style-name="L16">
      <style:paragraph-properties fo:text-align="justify" style:justify-single-word="false"/>
    </style:style>
    <style:style style:name="T1" style:family="text">
      <style:text-properties officeooo:rsid="00150668"/>
    </style:style>
    <style:style style:name="T2" style:family="text">
      <style:text-properties officeooo:rsid="0012961c"/>
    </style:style>
    <style:style style:name="T3" style:family="text">
      <style:text-properties officeooo:rsid="0014762f"/>
    </style:style>
    <style:style style:name="T4" style:family="text">
      <style:text-properties officeooo:rsid="0015a1b1"/>
    </style:style>
    <style:style style:name="T5" style:family="text">
      <style:text-properties officeooo:rsid="0016558d"/>
    </style:style>
    <style:style style:name="T6" style:family="text">
      <style:text-properties officeooo:rsid="001c244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P1">Administración Ejercicios Gym</text:p>
      <text:p text:style-name="Title"/>
      <text:p text:style-name="Title"/>
      <text:p text:style-name="Title"/>
      <text:p text:style-name="Title"/>
      <text:p text:style-name="Title"/>
      <text:p text:style-name="Title"/>
      <text:p text:style-name="P2"/>
      <text:h text:style-name="Heading_20_1" text:outline-level="1">Funcionalidad general </text:h>
      <text:p text:style-name="Text_20_body"><text:span text:style-name="Strong_20_Emphasis">Administración Ejercicios Gym</text:span> es una aplicación de escritorio desarrollada en <text:span text:style-name="Strong_20_Emphasis">Java Swing</text:span> que permite gestionar de forma sencilla e intuitiva los ejercicios de gimnasio y los músculos que intervienen en cada uno de ellos.</text:p>
      <text:p text:style-name="Text_20_body"/>
      <text:p text:style-name="Text_20_body">La aplicación actúa como un cliente gráfico que se comunica con un servicio REST backend. A través de su interfaz única, el usuario puede: </text:p>
      <text:list text:style-name="L1">
        <text:list-item>
          <text:p text:style-name="P3"><text:span text:style-name="Strong_20_Emphasis">Crear</text:span> nuevos ejercicios indicando nombre, descripción, imagen y pesos. </text:p>
        </text:list-item>
        <text:list-item>
          <text:p text:style-name="P3"><text:span text:style-name="Strong_20_Emphasis">Asociar</text:span> músculos a cada ejercicio, especificando el grado de implicación y si se trata de un músculo directo o no. </text:p>
        </text:list-item>
        <text:list-item>
          <text:p text:style-name="P3"><text:span text:style-name="Strong_20_Emphasis">Consultar</text:span> la lista completa de ejercicios cargados en el sistema. </text:p>
        </text:list-item>
        <text:list-item>
          <text:p text:style-name="P3"><text:span text:style-name="Strong_20_Emphasis">Visualizar</text:span> los detalles completos de cualquier ejercicio y los músculos que involucra. </text:p>
        </text:list-item>
        <text:list-item>
          <text:p text:style-name="P3"><text:span text:style-name="Strong_20_Emphasis">Modificar</text:span> ejercicios existentes cargando sus datos desde la tabla. </text:p>
        </text:list-item>
        <text:list-item>
          <text:p text:style-name="P3"><text:span text:style-name="Strong_20_Emphasis">Eliminar</text:span> ejercicios y asociaciones de músculos. </text:p>
        </text:list-item>
        <text:list-item>
          <text:p text:style-name="P4"><text:span text:style-name="Strong_20_Emphasis">Gestionar</text:span> el catálogo de músculos (altas, bajas y modificaciones) desde el menú <text:span text:style-name="Strong_20_Emphasis">Editar &gt; Editar músculos</text:span>. </text:p>
        </text:list-item>
      </text:list>
      <text:p text:style-name="Text_20_body"><text:span text:style-name="Strong_20_Emphasis">Nota:</text:span> La aplicación requiere conexión con el servicio backend <text:span text:style-name="Source_20_Text">wsejerciciosgym</text:span> para su funcionamiento completo. Asegúrese de que el servicio esté disponible antes de operar.</text:p>
      <text:p text:style-name="P2"/>
      <text:h text:style-name="P5" text:outline-level="1">Formulario principal </text:h>
      <text:p text:style-name="Text_20_body">La ventana principal de la aplicación se compone de cuatro secciones organizadas de izquierda a derecha y de arriba abajo. A la izquierda se encuentran los paneles de <text:span text:style-name="Strong_20_Emphasis">Ejercicio</text:span> y <text:span text:style-name="Strong_20_Emphasis">Músculos involucrados</text:span>. A la derecha se muestran la tabla de <text:span text:style-name="Strong_20_Emphasis">Ejercicios cargados</text:span> y el área de <text:span text:style-name="Strong_20_Emphasis">Detalles del ejercicio</text:span>. </text:p>
      <text:h text:style-name="P6" text:outline-level="2">Secciones de la interfaz </text:h>
      <text:list text:style-name="L2">
        <text:list-item>
          <text:p text:style-name="P7"><text:a xlink:type="simple" xlink:href="#Sección Ejercicio |outline" text:style-name="Internet_20_link" text:visited-style-name="Visited_20_Internet_20_Link">Ejercicio</text:a> - Campos y botones para introducir los datos del ejercicio. </text:p>
        </text:list-item>
        <text:list-item>
          <text:p text:style-name="P7"><text:a xlink:type="simple" xlink:href="#Sección Músculos involucrados |outline" text:style-name="Internet_20_link" text:visited-style-name="Visited_20_Internet_20_Link">Músculos involucrados</text:a> - Asociación de músculos al ejercicio. </text:p>
        </text:list-item>
        <text:list-item>
          <text:p text:style-name="P7"><text:a xlink:type="simple" xlink:href="#Sección Ejercicios cargados |outline" text:style-name="Internet_20_link" text:visited-style-name="Visited_20_Internet_20_Link">Ejercicios cargados</text:a> - Tabla con todos los ejercicios del sistema. </text:p>
        </text:list-item>
        <text:list-item>
          <text:p text:style-name="P7"><text:a xlink:type="simple" xlink:href="#Sección Detalles del ejercicio |outline" text:style-name="Internet_20_link" text:visited-style-name="Visited_20_Internet_20_Link">Detalles del ejercicio</text:a> - Información completa del ejercicio seleccionado. </text:p>
        </text:list-item>
        <text:list-item>
          <text:p text:style-name="P7"><text:a xlink:type="simple" xlink:href="#Editar músculos |outline" text:style-name="Internet_20_link" text:visited-style-name="Visited_20_Internet_20_Link">Editar músculos</text:a> - Gestión del catálogo de músculos. </text:p>
        </text:list-item>
        <text:list-item>
          <text:p text:style-name="P8"><text:a xlink:type="simple" xlink:href="#Flujo de uso recomendado |outline" text:style-name="Internet_20_link" text:visited-style-name="Visited_20_Internet_20_Link">Flujo de uso recomendado</text:a> - Pasos recomendados para crear, consultar, modificar y eliminar. </text:p>
        </text:list-item>
      </text:list>
      <text:h text:style-name="P6" text:outline-level="2">Menú Editar </text:h>
      <text:p text:style-name="Text_20_body">La aplicación dispone de un menú <text:span text:style-name="Strong_20_Emphasis">Editar</text:span> en la barra superior con la siguiente opción: </text:p>
      <text:list text:style-name="L3">
        <text:list-item>
          <text:p text:style-name="P9"><text:span text:style-name="Strong_20_Emphasis">Editar músculos</text:span> (Ctrl+Alt+E) - Abre la ventana de gestión del catálogo de músculos donde se pueden crear, modificar y eliminar músculos. </text:p>
        </text:list-item>
      </text:list>
      <text:h text:style-name="P6" text:outline-level="2">Menú Ayuda </text:h>
      <text:p text:style-name="Text_20_body">La aplicación dispone de un menú <text:span text:style-name="Strong_20_Emphasis">Ayuda</text:span> en la barra superior con las siguientes opciones: </text:p>
      <text:list text:style-name="L4">
        <text:list-item>
          <text:p text:style-name="P10"><text:span text:style-name="Strong_20_Emphasis">Sobre</text:span> (Ctrl+Alt+S) - Abre este sistema de ayuda. </text:p>
        </text:list-item>
        <text:list-item>
          <text:p text:style-name="P11"><text:span text:style-name="Strong_20_Emphasis">Salir</text:span> (Ctrl+Alt+F4) - Cierra la aplicación. </text:p>
        </text:list-item>
      </text:list>
      <text:p text:style-name="P12"/>
      <text:p text:style-name="P13"/>
      <text:h text:style-name="P14" text:outline-level="1">Sección Ejercicio </text:h>
      <text:p text:style-name="P12">Panel donde se introducen y editan los datos básicos del ejercicio. </text:p>
      <text:h text:style-name="P15" text:outline-level="2">Campos </text:h>
      <text:p text:style-name="P16"><text:span text:style-name="Strong_20_Emphasis">Nombre</text:span><text:line-break/>Texto que identifica el ejercicio (ej: "Press banca", "Sentadilla"). Campo obligatorio. </text:p>
      <text:p text:style-name="P16"><text:span text:style-name="Strong_20_Emphasis">Descripción</text:span><text:line-break/>Descripción breve del ejercicio. Campo obligatorio. </text:p>
      <text:p text:style-name="P16"><text:span text:style-name="Strong_20_Emphasis">Imagen</text:span><text:line-break/>Ruta absoluta de la imagen representativa del ejercicio en el servidor. Debe seleccionarse <text:span text:style-name="Strong_20_Emphasis">Elegir imagen</text:span> y elegir la imagen deseada respecto al ejercicio. Cuando se guarda el formulario la imagen se guarda usando ruta relativa en el servidor. </text:p>
      <text:p text:style-name="P16"><text:span text:style-name="Strong_20_Emphasis">Peso</text:span><text:span text:style-name="Strong_20_Emphasis"><text:span text:style-name="T1">_</text:span></text:span><text:span text:style-name="Strong_20_Emphasis"><text:span text:style-name="T2">mínimo</text:span></text:span><text:line-break/>Valor numérico entero que representa el peso mínimo recomendado para el ejercicio. </text:p>
      <text:p text:style-name="P12"><text:span text:style-name="Strong_20_Emphasis">Peso</text:span><text:span text:style-name="Strong_20_Emphasis"><text:span text:style-name="T2">_</text:span></text:span><text:span text:style-name="Strong_20_Emphasis">máximo</text:span><text:line-break/>Valor numérico entero que representa el peso máximo recomendado para el ejercicio. </text:p>
      <text:h text:style-name="P15" text:outline-level="2">Botones </text:h>
      <text:p text:style-name="P16"><text:span text:style-name="Strong_20_Emphasis">Validar</text:span><text:line-break/>Comprueba que la ruta de imagen introducida existe en el servidor y que su extensión es <text:span text:style-name="Source_20_Text">.jpg</text:span> o <text:span text:style-name="Source_20_Text">.jpeg</text:span>. Es necesario validar la imagen antes de poder guardar el formulario. </text:p>
      <text:p text:style-name="P16"><text:span text:style-name="Strong_20_Emphasis">Guardar</text:span><text:span text:style-name="Strong_20_Emphasis"><text:span text:style-name="T3">_</text:span></text:span><text:span text:style-name="Strong_20_Emphasis">formulario</text:span><text:line-break/>Guarda el ejercicio junto con todos los músculos involucrados. Si se selecciona un ejercicio existente en la tabla (doble clic), lo actualiza. Si no hay selección previa, crea un ejercicio nuevo. Valida que todos los campos obligatorios estén rellenos y que la imagen esté validada. </text:p>
      <text:p text:style-name="P12"/>
      <text:p text:style-name="P13"/>
      <text:h text:style-name="P14" text:outline-level="1">Sección Músculos involucrados </text:h>
      <text:p text:style-name="P12">Panel que permite asociar músculos al ejercicio actual. Cada ejercicio puede tener varios músculos asociados, con información adicional sobre su implicación. </text:p>
      <text:h text:style-name="P15" text:outline-level="2">Campos </text:h>
      <text:p text:style-name="P16"><text:span text:style-name="Strong_20_Emphasis">Músculo</text:span><text:line-break/>Desplegable con todos los músculos disponibles en el sistema. Al seleccionar un músculo, si ya existe una asociación con el ejercicio actual, se cargan sus datos permitiendo su modificación. </text:p>
      <text:p text:style-name="P16"><text:span text:style-name="Strong_20_Emphasis">Es</text:span><text:span text:style-name="Strong_20_Emphasis"><text:span text:style-name="T4">_</text:span></text:span><text:span text:style-name="Strong_20_Emphasis">involucrado</text:span><text:line-break/>Indica si el músculo está implicado en el ejercicio. Si se selecciona <text:span text:style-name="Strong_20_Emphasis">Sí</text:span>, se habilitan los campos de descripción, porcentaje de activación y tipo de contracción. Si se selecciona <text:span text:style-name="Strong_20_Emphasis">No</text:span>, estos campos se deshabilitan. </text:p>
      <text:p text:style-name="P16"><text:span text:style-name="Strong_20_Emphasis">Descripción</text:span><text:line-break/>Descripción del rol que desempeña el músculo en el ejercicio. Se habilita solo si "Es involucrado" está en <text:span text:style-name="Strong_20_Emphasis">Sí</text:span>. </text:p>
      <text:p text:style-name="P16"><text:span text:style-name="Strong_20_Emphasis">Porcentaje</text:span><text:span text:style-name="Strong_20_Emphasis"><text:span text:style-name="T4">_</text:span></text:span><text:span text:style-name="Strong_20_Emphasis">activación</text:span><text:span text:style-name="Strong_20_Emphasis"><text:span text:style-name="T4">_</text:span></text:span><text:span text:style-name="Strong_20_Emphasis">(0-100)</text:span><text:line-break/>Grado de activación del músculo durante el ejercicio, en porcentaje. Debe ser un valor entre 0 y 100. Se habilita solo si "Es involucrado" está en <text:span text:style-name="Strong_20_Emphasis">Sí</text:span>. </text:p>
      <text:p text:style-name="P12"><text:span text:style-name="Strong_20_Emphasis">Es</text:span><text:span text:style-name="Strong_20_Emphasis"><text:span text:style-name="T4">_</text:span></text:span><text:span text:style-name="Strong_20_Emphasis">directo</text:span><text:line-break/>Indica si el músculo es el principal ejecutor del movimiento (directo) o actúa como sinergista/estabilizador (no directo). Se habilita solo si "Es involucrado" está en <text:span text:style-name="Strong_20_Emphasis">Sí</text:span>. </text:p>
      <text:h text:style-name="P15" text:outline-level="2">Botones </text:h>
      <text:p text:style-name="P16"><text:span text:style-name="Strong_20_Emphasis">Guardar</text:span><text:span text:style-name="Strong_20_Emphasis"><text:span text:style-name="T4">_</text:span></text:span><text:span text:style-name="Strong_20_Emphasis">músculo</text:span><text:line-break/>Añade el músculo configurado a la lista temporal de músculos involucrados del ejercicio. Valida que la descripción no esté vacía y que el porcentaje de activación esté entre 0 y 100. </text:p>
      <text:p text:style-name="P16"><text:span text:style-name="Strong_20_Emphasis">Eliminar</text:span><text:span text:style-name="Strong_20_Emphasis"><text:span text:style-name="T4">_</text:span></text:span><text:span text:style-name="Strong_20_Emphasis">músculo</text:span><text:line-break/>Elimina el músculo seleccionado de la lista temporal de músculos involucrados. No afecta a la base de datos hasta que se guarde el formulario completo. </text:p>
      <text:p text:style-name="P12"/>
      <text:p text:style-name="P13"/>
      <text:h text:style-name="P14" text:outline-level="1">Sección Ejercicios cargados </text:h>
      <text:p text:style-name="P12">Tabla que muestra todos los ejercicios existentes en el sistema. Los datos se cargan automáticamente al iniciar la aplicación. </text:p>
      <text:h text:style-name="P15" text:outline-level="2">Columnas de la tabla </text:h>
      <text:list text:style-name="L5">
        <text:list-item>
          <text:p text:style-name="P17"><text:span text:style-name="Strong_20_Emphasis">Id</text:span> - Identificador numérico único del ejercicio. </text:p>
        </text:list-item>
        <text:list-item>
          <text:p text:style-name="P17"><text:span text:style-name="Strong_20_Emphasis">Nombre</text:span> - Nombre del ejercicio. </text:p>
        </text:list-item>
        <text:list-item>
          <text:p text:style-name="P17"><text:span text:style-name="Strong_20_Emphasis">Imagen</text:span> - Ruta de la imagen asociada en el servidor. </text:p>
        </text:list-item>
        <text:list-item>
          <text:p text:style-name="P17"><text:span text:style-name="Strong_20_Emphasis">Peso mínimo</text:span> - Peso mínimo para realizar el ejercicio. </text:p>
        </text:list-item>
        <text:list-item>
          <text:p text:style-name="P18"><text:span text:style-name="Strong_20_Emphasis">Peso máximo</text:span> - Peso máximo para realizar el ejercicio. </text:p>
        </text:list-item>
      </text:list>
      <text:h text:style-name="P15" text:outline-level="2">Interacción </text:h>
      <text:list text:style-name="L6">
        <text:list-item>
          <text:p text:style-name="P19"><text:span text:style-name="Strong_20_Emphasis">Un clic</text:span> en una fila: muestra los detalles completos del ejercicio y sus músculos en el panel <text:span text:style-name="Emphasis">Detalles del ejercicio</text:span>. </text:p>
        </text:list-item>
        <text:list-item>
          <text:p text:style-name="P20"><text:span text:style-name="Strong_20_Emphasis">Doble clic</text:span> en una fila: carga los datos del ejercicio en los campos del formulario para su edición. </text:p>
        </text:list-item>
      </text:list>
      <text:h text:style-name="P15" text:outline-level="2">Botones </text:h>
      <text:p text:style-name="P16"><text:span text:style-name="Strong_20_Emphasis">Eliminar</text:span><text:span text:style-name="Strong_20_Emphasis"><text:span text:style-name="T5">_</text:span></text:span><text:span text:style-name="Strong_20_Emphasis">ejercicio</text:span><text:line-break/>Elimina de la base de datos el ejercicio seleccionado en la tabla. Es necesario tener una fila seleccionada para poder usarlo. </text:p>
      <text:p text:style-name="P12"/>
      <text:p text:style-name="P13"/>
      <text:h text:style-name="P14" text:outline-level="1">Sección Detalles del ejercicio </text:h>
      <text:p text:style-name="P12">Área de texto no editable que muestra la información completa del ejercicio seleccionado en la tabla. Se actualiza automáticamente al hacer clic sobre cualquier fila de <text:span text:style-name="Emphasis">Ejercicios cargados</text:span>. </text:p>
      <text:h text:style-name="P15" text:outline-level="2">Información mostrada </text:h>
      <text:list text:style-name="L7">
        <text:list-item>
          <text:p text:style-name="P21"><text:span text:style-name="Strong_20_Emphasis">Datos del ejercicio:</text:span> nombre, descripción, ruta de imagen, peso mínimo y peso máximo. </text:p>
        </text:list-item>
        <text:list-item>
          <text:p text:style-name="P22"><text:span text:style-name="Strong_20_Emphasis">Músculos involucrados:</text:span> para cada músculo asociado se muestra su nombre, descripción, zona anatómica y grupo muscular. </text:p>
        </text:list-item>
      </text:list>
      <text:p text:style-name="P12">Esta sección es de solo lectura y se actualiza dinámicamente con cada selección en la tabla de ejercicios. </text:p>
      <text:p text:style-name="P12"/>
      <text:p text:style-name="P13"/>
      <text:h text:style-name="P14" text:outline-level="1">Editar músculos </text:h>
      <text:p text:style-name="P12">Ventana de diálogo que permite gestionar el catálogo de músculos del sistema. Se abre desde el menú <text:span text:style-name="Strong_20_Emphasis">Editar &gt; Editar músculos</text:span> (Ctrl+Alt+E). Desde esta ventana se pueden crear, modificar y eliminar músculos de forma independiente a los ejercicios. </text:p>
      <text:h text:style-name="P15" text:outline-level="2">Secciones de la interfaz </text:h>
      <text:h text:style-name="P23" text:outline-level="3">Formulario de músculo (izquierda) </text:h>
      <text:p text:style-name="P16"><text:span text:style-name="Strong_20_Emphasis">Nombre</text:span><text:line-break/>Texto que identifica el músculo (ej: "Pectoral mayor"). Campo obligatorio. </text:p>
      <text:p text:style-name="P16"><text:span text:style-name="Strong_20_Emphasis">Descripción</text:span><text:line-break/>Descripción breve del músculo. Campo obligatorio. </text:p>
      <text:p text:style-name="P16"><text:span text:style-name="Strong_20_Emphasis">Zona</text:span><text:line-break/>Desplegable con la zona anatómica a la que pertenece el músculo. Las opciones disponibles son: <text:span text:style-name="Strong_20_Emphasis">SUPERIOR</text:span>, <text:span text:style-name="Strong_20_Emphasis">INFERIOR</text:span> y <text:span text:style-name="Strong_20_Emphasis">CORE</text:span>. Es obligatorio seleccionar un valor distinto de "Seleccionar". </text:p>
      <text:p text:style-name="P12"><text:span text:style-name="Strong_20_Emphasis">Grupo</text:span><text:line-break/>Desplegable con el grupo muscular al que pertenece. Las opciones disponibles son: <text:span text:style-name="Strong_20_Emphasis">PECHO</text:span>, <text:span text:style-name="Strong_20_Emphasis">ESPALDA</text:span>, <text:span text:style-name="Strong_20_Emphasis">HOMBRO</text:span>, <text:span text:style-name="Strong_20_Emphasis">BRAZO</text:span>, <text:span text:style-name="Strong_20_Emphasis">LUMBARES</text:span>, <text:span text:style-name="Strong_20_Emphasis">ABDOMINALES</text:span> y <text:span text:style-name="Strong_20_Emphasis">PIERNA</text:span>. Es obligatorio seleccionar un valor distinto de "Seleccionar". </text:p>
      <text:h text:style-name="P23" text:outline-level="3">Tabla de músculos (derecha) </text:h>
      <text:p text:style-name="P12">Muestra todos los músculos existentes en el sistema con las columnas <text:span text:style-name="Strong_20_Emphasis">Id</text:span> y <text:span text:style-name="Strong_20_Emphasis">Nombre</text:span>. Los datos se cargan automáticamente al abrir la ventana. </text:p>
      <text:list text:style-name="L8">
        <text:list-item>
          <text:p text:style-name="P24"><text:span text:style-name="Strong_20_Emphasis">Un clic</text:span> en una fila: muestra los detalles completos del músculo en el área de texto inferior. </text:p>
        </text:list-item>
        <text:list-item>
          <text:p text:style-name="P25"><text:span text:style-name="Strong_20_Emphasis">Doble clic</text:span> en una fila: carga los datos del músculo en los campos del formulario para su edición. </text:p>
        </text:list-item>
      </text:list>
      <text:h text:style-name="P23" text:outline-level="3">Detalles (inferior) </text:h>
      <text:p text:style-name="P12">Área de texto no editable que muestra la información completa del músculo seleccionado en la tabla: nombre, descripción, zona y grupo muscular. Se actualiza automáticamente al hacer clic sobre cualquier fila. </text:p>
      <text:h text:style-name="P15" text:outline-level="2">Botones </text:h>
      <text:p text:style-name="P16"><text:span text:style-name="Strong_20_Emphasis">Guardar</text:span><text:span text:style-name="Strong_20_Emphasis"><text:span text:style-name="T6">_</text:span></text:span><text:span text:style-name="Strong_20_Emphasis">músculo</text:span><text:line-break/>Guarda el músculo con los datos introducidos en el formulario. Si se ha seleccionado un músculo existente en la tabla (doble clic), lo actualiza. Si no hay selección previa, crea un músculo nuevo. Valida que el nombre, la descripción, la zona y el grupo sean correctos antes de guardar. </text:p>
      <text:p text:style-name="P12"><text:span text:style-name="Strong_20_Emphasis">Eliminar</text:span><text:span text:style-name="Strong_20_Emphasis"><text:span text:style-name="T6">_</text:span></text:span><text:span text:style-name="Strong_20_Emphasis">músculo</text:span><text:line-break/>Elimina de la base de datos el músculo seleccionado en la tabla. Es necesario tener una fila seleccionada para poder usarlo.</text:p>
      <text:p text:style-name="P26"><text:soft-page-break/></text:p>
      <text:h text:style-name="P15" text:outline-level="2">Nota </text:h>
      <text:p text:style-name="P12">Al cerrar la ventana, el catálogo de músculos del formulario principal se refresca automáticamente para reflejar los cambios realizados.</text:p>
      <text:p text:style-name="P12"/>
      <text:h text:style-name="P14" text:outline-level="1">Flujo de uso recomendado </text:h>
      <text:h text:style-name="P27" text:outline-level="2">A. Crear un nuevo ejercicio </text:h>
      <text:list text:style-name="L9">
        <text:list-item>
          <text:p text:style-name="P28">Compruebe que no haya seleccionado un ejercicio en la tabla, en caso de estarlo selecciona la primera fila vacia. </text:p>
        </text:list-item>
        <text:list-item>
          <text:p text:style-name="P28">Rellene los campos de la sección <text:span text:style-name="Strong_20_Emphasis">Ejercicio</text:span>: nombre, descripción, ruta de imagen y pesos. </text:p>
        </text:list-item>
        <text:list-item>
          <text:p text:style-name="P28">Pulse <text:span text:style-name="Strong_20_Emphasis">Elegir imagen</text:span> para seleccionar la imagen deseada. </text:p>
        </text:list-item>
        <text:list-item>
          <text:p text:style-name="P28">En la sección <text:span text:style-name="Strong_20_Emphasis">Músculos involucrados</text:span>, seleccione un músculo del desplegable. </text:p>
        </text:list-item>
        <text:list-item>
          <text:p text:style-name="P28">Marque <text:span text:style-name="Strong_20_Emphasis">Sí</text:span> en "Es involucrado" para habilitar los campos adicionales. </text:p>
        </text:list-item>
        <text:list-item>
          <text:p text:style-name="P28">Introduzca la descripción, el porcentaje de activación y el tipo de contracción (directo o no directo). </text:p>
        </text:list-item>
        <text:list-item>
          <text:p text:style-name="P28">Pulse <text:span text:style-name="Strong_20_Emphasis">Guardar músculo</text:span> para añadirlo a la lista temporal. </text:p>
        </text:list-item>
        <text:list-item>
          <text:p text:style-name="P28">Repita los pasos 3 a 6 para cada músculo que desee asociar. </text:p>
        </text:list-item>
        <text:list-item>
          <text:p text:style-name="P29">Pulse <text:span text:style-name="Strong_20_Emphasis">Guardar formulario</text:span> para enviar todos los datos al servidor y crear el ejercicio definitivo. </text:p>
        </text:list-item>
      </text:list>
      <text:h text:style-name="P15" text:outline-level="2">B. Consultar detalles de un ejercicio </text:h>
      <text:list text:style-name="L10">
        <text:list-item>
          <text:p text:style-name="P30">En la tabla <text:span text:style-name="Strong_20_Emphasis">Ejercicios cargados</text:span>, haga <text:span text:style-name="Strong_20_Emphasis">un clic</text:span> sobre el ejercicio deseado. </text:p>
        </text:list-item>
        <text:list-item>
          <text:p text:style-name="P31">Los detalles completos, incluyendo sus músculos asociados, aparecerán en el panel <text:span text:style-name="Strong_20_Emphasis">Detalles del ejercicio</text:span>. </text:p>
        </text:list-item>
      </text:list>
      <text:h text:style-name="P15" text:outline-level="2">C. Modificar un ejercicio existente </text:h>
      <text:list text:style-name="L11">
        <text:list-item>
          <text:p text:style-name="P32">En la tabla de ejercicios, haga <text:span text:style-name="Strong_20_Emphasis">doble clic</text:span> sobre el ejercicio que desea modificar. </text:p>
        </text:list-item>
        <text:list-item>
          <text:p text:style-name="P32">Los datos del ejercicio se cargarán en los campos del formulario, y los músculos asociados se cargarán en la lista temporal. </text:p>
        </text:list-item>
        <text:list-item>
          <text:p text:style-name="P32">Modifique los campos necesarios. </text:p>
        </text:list-item>
        <text:list-item>
          <text:p text:style-name="P33">Pulse <text:span text:style-name="Strong_20_Emphasis">Guardar formulario</text:span> para actualizar el ejercicio en la base de datos. </text:p>
        </text:list-item>
      </text:list>
      <text:h text:style-name="P15" text:outline-level="2">D. Eliminar un ejercicio </text:h>
      <text:list text:style-name="L12">
        <text:list-item>
          <text:p text:style-name="P34">Seleccione con un clic el ejercicio en la tabla. </text:p>
        </text:list-item>
        <text:list-item>
          <text:p text:style-name="P34">Pulse <text:span text:style-name="Strong_20_Emphasis">Eliminar ejercicio</text:span>. </text:p>
        </text:list-item>
        <text:list-item>
          <text:p text:style-name="P35">El ejercicio y todas sus asociaciones de músculos se eliminarán de la base de datos. </text:p>
        </text:list-item>
      </text:list>
      <text:h text:style-name="P15" text:outline-level="2"><text:soft-page-break/>E. Eliminar un músculo asociado </text:h>
      <text:list text:style-name="L13">
        <text:list-item>
          <text:p text:style-name="P36">Seleccione el músculo en el desplegable de la sección <text:span text:style-name="Strong_20_Emphasis">Músculos involucrados</text:span>. </text:p>
        </text:list-item>
        <text:list-item>
          <text:p text:style-name="P36">Pulse <text:span text:style-name="Strong_20_Emphasis">Eliminar músculo</text:span> para quitarlo de la lista temporal. </text:p>
        </text:list-item>
        <text:list-item>
          <text:p text:style-name="P37">Para que el cambio persista, pulse <text:span text:style-name="Strong_20_Emphasis">Guardar formulario</text:span>. </text:p>
        </text:list-item>
      </text:list>
      <text:h text:style-name="P15" text:outline-level="2">F. Gestionar el catálogo de músculos </text:h>
      <text:h text:style-name="P23" text:outline-level="3">F.1. Crear un nuevo músculo </text:h>
      <text:list text:style-name="L14">
        <text:list-item>
          <text:p text:style-name="P38">Abra la ventana <text:span text:style-name="Strong_20_Emphasis">Editar músculos</text:span> desde el menú <text:span text:style-name="Strong_20_Emphasis">Editar &gt; Editar músculos</text:span> (Ctrl+Alt+E). </text:p>
        </text:list-item>
        <text:list-item>
          <text:p text:style-name="P38">Rellene los campos del formulario: nombre, descripción, zona y grupo. </text:p>
        </text:list-item>
        <text:list-item>
          <text:p text:style-name="P39">Pulse <text:span text:style-name="Strong_20_Emphasis">Guardar músculo</text:span> para crearlo en la base de datos. </text:p>
        </text:list-item>
      </text:list>
      <text:h text:style-name="P23" text:outline-level="3">F.2. Modificar un músculo existente </text:h>
      <text:list text:style-name="L15">
        <text:list-item>
          <text:p text:style-name="P40">En la tabla de músculos, haga <text:span text:style-name="Strong_20_Emphasis">doble clic</text:span> sobre el músculo que desea modificar. </text:p>
        </text:list-item>
        <text:list-item>
          <text:p text:style-name="P40">Los datos del músculo se cargarán en los campos del formulario. </text:p>
        </text:list-item>
        <text:list-item>
          <text:p text:style-name="P40">Modifique los campos necesarios. </text:p>
        </text:list-item>
        <text:list-item>
          <text:p text:style-name="P41">Pulse <text:span text:style-name="Strong_20_Emphasis">Guardar músculo</text:span> para actualizarlo en la base de datos. </text:p>
        </text:list-item>
      </text:list>
      <text:h text:style-name="P23" text:outline-level="3">F.3. Eliminar un músculo </text:h>
      <text:list text:style-name="L16">
        <text:list-item>
          <text:p text:style-name="P42">Seleccione con un clic el músculo en la tabla. </text:p>
        </text:list-item>
        <text:list-item>
          <text:p text:style-name="P42">Pulse <text:span text:style-name="Strong_20_Emphasis">Eliminar músculo</text:span>. </text:p>
        </text:list-item>
        <text:list-item>
          <text:p text:style-name="P43">El músculo se eliminará de la base de datos. </text:p>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1"/><text:page-number text:select-page="current">10</text:page-number><text:s/>/ <text:page-count>10</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9T17:18:14.895335600</meta:creation-date>
    <dc:date>2026-05-29T17:31:55.728891500</dc:date>
    <meta:editing-duration>PT13M34S</meta:editing-duration>
    <meta:editing-cycles>14</meta:editing-cycles>
    <meta:generator>LibreOffice/26.2.3.2$Windows_X86_64 LibreOffice_project/70e089b17412e4cb7773e41413306b17a2328c34</meta:generator>
    <meta:print-date>2026-05-29T17:32:02.692147400</meta:print-date>
    <meta:printed-by>Archivos PDF</meta:printed-by>
    <meta:document-statistic meta:table-count="0" meta:image-count="0" meta:object-count="0" meta:page-count="10" meta:paragraph-count="130" meta:word-count="1720" meta:character-count="10931" meta:non-whitespace-character-count="9275"/>
  </office:meta>
</office:document-meta>
</file>